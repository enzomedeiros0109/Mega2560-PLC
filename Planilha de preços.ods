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165cm"/>
    </style:style>
    <style:style style:name="co2" style:family="table-column">
      <style:table-column-properties fo:break-before="auto" style:column-width="11.689cm"/>
    </style:style>
    <style:style style:name="co3" style:family="table-column">
      <style:table-column-properties fo:break-before="auto" style:column-width="4.531cm"/>
    </style:style>
    <style:style style:name="co4" style:family="table-column">
      <style:table-column-properties fo:break-before="auto" style:column-width="3.604cm"/>
    </style:style>
    <style:style style:name="co5" style:family="table-column">
      <style:table-column-properties fo:break-before="auto" style:column-width="3.739cm"/>
    </style:style>
    <style:style style:name="co6" style:family="table-column">
      <style:table-column-properties fo:break-before="auto" style:column-width="4.175cm"/>
    </style:style>
    <style:style style:name="co7" style:family="table-column">
      <style:table-column-properties fo:break-before="auto" style:column-width="9.551cm"/>
    </style:style>
    <style:style style:name="co8" style:family="table-column">
      <style:table-column-properties fo:break-before="auto" style:column-width="11.966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7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start" fo:margin-left="0cm"/>
    </style:style>
    <style:style style:name="ce28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4" style:family="table-cell" style:parent-style-name="Default">
      <style:table-cell-properties fo:border="0.74pt solid #000000"/>
      <style:text-properties fo:font-size="15pt" fo:font-weight="bold" style:font-size-asian="15pt" style:font-weight-asian="bold" style:font-size-complex="15pt" style:font-weight-complex="bold"/>
    </style:style>
    <style:style style:name="ce30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start" fo:margin-left="0cm"/>
    </style:style>
    <style:style style:name="ce31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3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8" style:family="table-cell" style:parent-style-name="Default" style:data-style-name="N2">
      <style:table-cell-properties style:text-align-source="fix" style:repeat-content="false" fo:border="0.74pt solid #000000"/>
      <style:paragraph-properties fo:text-align="end" fo:margin-left="0cm"/>
    </style:style>
    <style:style style:name="ce9" style:family="table-cell" style:parent-style-name="Default" style:data-style-name="N2">
      <style:table-cell-properties style:text-align-source="fix" style:repeat-content="false" fo:border="0.74pt solid #000000"/>
      <style:paragraph-properties fo:text-align="end" fo:margin-left="0cm"/>
      <style:text-properties style:font-name="Liberation Serif" style:font-name-asian="Segoe UI" style:font-name-complex="Tahoma"/>
    </style:style>
    <style:style style:name="ce3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Liberation Serif" style:font-name-asian="Segoe UI" style:font-name-complex="Tahoma"/>
    </style:style>
    <style:style style:name="ce11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</style:style>
    <style:style style:name="ce12" style:family="table-cell" style:parent-style-name="Default">
      <style:table-cell-properties style:text-align-source="value-type" style:repeat-content="false" fo:wrap-option="wrap" fo:border="0.74pt solid #000000"/>
      <style:paragraph-properties fo:margin-left="0cm"/>
    </style:style>
    <style:style style:name="ce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6pt" style:font-size-asian="16pt" style:font-size-complex="16pt"/>
    </style:style>
    <style:style style:name="ce14" style:family="table-cell" style:parent-style-name="Default">
      <style:table-cell-properties fo:border="0.74pt solid #000000"/>
    </style:style>
    <style:style style:name="ce3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5pt" style:font-size-asian="15pt" style:font-size-complex="15pt"/>
    </style:style>
  </office:automatic-styles>
  <office:body>
    <office:spreadsheet>
      <table:calculation-settings table:automatic-find-labels="false" table:use-regular-expressions="false" table:use-wildcards="true"/>
      <table:table table:name="Orçamento" table:style-name="ta1">
        <table:table-column table:style-name="co1" table:default-cell-style-name="ce28"/>
        <table:table-column table:style-name="co2" table:default-cell-style-name="ce31"/>
        <table:table-column table:style-name="co3" table:default-cell-style-name="ce31"/>
        <table:table-column table:style-name="co4" table:default-cell-style-name="ce32"/>
        <table:table-column table:style-name="co5" table:default-cell-style-name="ce8"/>
        <table:table-column table:style-name="co6" table:default-cell-style-name="ce32"/>
        <table:table-column table:style-name="co7" table:default-cell-style-name="ce8"/>
        <table:table-column table:style-name="co8" table:default-cell-style-name="ce12"/>
        <table:table-column table:style-name="co9" table:number-columns-repeated="4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Footprint</text:p>
          </table:table-cell>
          <table:covered-table-cell table:style-name="ce4"/>
          <table:table-cell table:style-name="ce4" office:value-type="string" calcext:value-type="string">
            <text:p>Valores</text:p>
          </table:table-cell>
          <table:table-cell table:style-name="ce1" office:value-type="string" calcext:value-type="string">
            <text:p>Qtd na placa</text:p>
          </table:table-cell>
          <table:table-cell table:style-name="ce1" office:value-type="string" calcext:value-type="string">
            <text:p>Preço (Reais)</text:p>
          </table:table-cell>
          <table:table-cell table:style-name="ce1" office:value-type="string" calcext:value-type="string">
            <text:p>Qtd na compra</text:p>
          </table:table-cell>
          <table:table-cell table:style-name="ce1" office:value-type="string" calcext:value-type="string">
            <text:p>Custo total por componente (Reais)</text:p>
          </table:table-cell>
          <table:table-cell table:style-name="ce1" office:value-type="string" calcext:value-type="string">
            <text:p>Site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Capacitor_SMD</text:p>
          </table:table-cell>
          <table:table-cell table:style-name="ce30" office:value-type="string" calcext:value-type="string">
            <text:p>C_0805_2012Metric</text:p>
          </table:table-cell>
          <table:table-cell table:style-name="ce30" office:value-type="string" calcext:value-type="string">
            <text:p>100nF</text:p>
          </table:table-cell>
          <table:table-cell office:value-type="float" office:value="16" calcext:value-type="float">
            <text:p>16</text:p>
          </table:table-cell>
          <table:table-cell office:value-type="float" office:value="19.16" calcext:value-type="float">
            <text:p>19,16</text:p>
          </table:table-cell>
          <table:table-cell office:value-type="float" office:value="100" calcext:value-type="float">
            <text:p>100</text:p>
          </table:table-cell>
          <table:table-cell table:formula="of:=[.E2]/[.F2]*[.D2]" office:value-type="float" office:value="3.0656" calcext:value-type="float">
            <text:p>3,07</text:p>
          </table:table-cell>
          <table:table-cell office:value-type="string" calcext:value-type="string">
            <text:p><text:a xlink:href="https://www.mercadolivre.com.br/100-pcs--capacitor-ceramico-smd-0805-100nf-50v-01uf/up/MLBU3922269514?pdp_filters=item_id%3AMLB4626255921&amp;matt_tool=38524122#origin=share&amp;sid=share&amp;wid=MLB4626255921&amp;action=copy" xlink:type="simple">https://www.mercadolivre.com.br/100-pcs--capacitor-ceramico-smd-0805-100nf-50v-01uf/up/MLBU3922269514?pdp_filters=item_id%3AMLB4626255921&amp;matt_tool=38524122#origin=share&amp;sid=share&amp;wid=MLB4626255921&amp;action=copy</text:a></text:p>
          </table:table-cell>
          <table:table-cell/>
          <table:table-cell table:style-name="ce36" office:value-type="string" calcext:value-type="string" table:number-columns-spanned="3" table:number-rows-spanned="2">
            <text:p>Custo das Peças</text:p>
          </table:table-cell>
          <table:covered-table-cell table:number-columns-repeated="2" table:style-name="ce14"/>
        </table:table-row>
        <table:table-row table:style-name="ro2">
          <table:table-cell office:value-type="string" calcext:value-type="string">
            <text:p>Capacitor_SMD</text:p>
          </table:table-cell>
          <table:table-cell office:value-type="string" calcext:value-type="string">
            <text:p>C_0805_2012Metric</text:p>
          </table:table-cell>
          <table:table-cell office:value-type="string" calcext:value-type="string">
            <text:p>22pF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14.63" calcext:value-type="float">
            <text:p>14,63</text:p>
          </table:table-cell>
          <table:table-cell table:style-name="ce33" office:value-type="float" office:value="50" calcext:value-type="float">
            <text:p>50</text:p>
          </table:table-cell>
          <table:table-cell table:formula="of:=[.E3]/[.F3]*[.D3]" office:value-type="float" office:value="0.5852" calcext:value-type="float">
            <text:p>0,59</text:p>
          </table:table-cell>
          <table:table-cell office:value-type="string" calcext:value-type="string">
            <text:p><text:a xlink:href="https://www.mercadolivre.com.br/50x-capacitor-22pf50v-0603-smd-08x16mm-np0-samsung/up/MLBU1429310606?pdp_filters=item_id%3AMLB2741616246&amp;matt_tool=38524122#origin=share&amp;sid=share&amp;wid=MLB2741616246&amp;action=copy" xlink:type="simple">https://www.mercadolivre.com.br/50x-capacitor-22pf50v-0603-smd-08x16mm-np0-samsung/up/MLBU1429310606?pdp_filters=item_id%3AMLB2741616246&amp;matt_tool=38524122#origin=share&amp;sid=share&amp;wid=MLB2741616246&amp;action=copy</text:a></text:p>
          </table:table-cell>
          <table:table-cell/>
          <table:covered-table-cell table:number-columns-repeated="3" table:style-name="ce14"/>
        </table:table-row>
        <table:table-row table:style-name="ro2">
          <table:table-cell office:value-type="string" calcext:value-type="string">
            <text:p>Capacitor_THT</text:p>
          </table:table-cell>
          <table:table-cell office:value-type="string" calcext:value-type="string">
            <text:p>CP_Radial_D5.0mm_P2.50mm</text:p>
          </table:table-cell>
          <table:table-cell office:value-type="string" calcext:value-type="string">
            <text:p>10uF/16V</text:p>
          </table:table-cell>
          <table:table-cell office:value-type="float" office:value="2" calcext:value-type="float">
            <text:p>2</text:p>
          </table:table-cell>
          <table:table-cell office:value-type="float" office:value="13.9" calcext:value-type="float">
            <text:p>13,90</text:p>
          </table:table-cell>
          <table:table-cell office:value-type="float" office:value="10" calcext:value-type="float">
            <text:p>10</text:p>
          </table:table-cell>
          <table:table-cell table:formula="of:=[.E4]/[.F4]*[.D4]" office:value-type="float" office:value="2.78" calcext:value-type="float">
            <text:p>2,78</text:p>
          </table:table-cell>
          <table:table-cell office:value-type="string" calcext:value-type="string">
            <text:p><text:a xlink:href="https://www.mercadolivre.com.br/capacitor-eletrolitico-10uf-50v--10-pecas/up/MLBU1740482830?pdp_filters=item_id%3AMLB3687468376&amp;matt_tool=38524122#origin=share&amp;sid=share&amp;wid=MLB3687468376&amp;action=copy" xlink:type="simple">https://www.mercadolivre.com.br/capacitor-eletrolitico-10uf-50v--10-pecas/up/MLBU1740482830?pdp_filters=item_id%3AMLB3687468376&amp;matt_tool=38524122#origin=share&amp;sid=share&amp;wid=MLB3687468376&amp;action=copy</text:a></text:p>
          </table:table-cell>
          <table:table-cell/>
          <table:table-cell table:style-name="ce38" table:formula="of:=SUM([.G2:.G31])" office:value-type="float" office:value="416.68462" calcext:value-type="float" table:number-columns-spanned="3" table:number-rows-spanned="2">
            <text:p>416,68462</text:p>
          </table:table-cell>
          <table:covered-table-cell table:number-columns-repeated="2" table:style-name="ce14"/>
        </table:table-row>
        <table:table-row table:style-name="ro2">
          <table:table-cell office:value-type="string" calcext:value-type="string">
            <text:p>Capacitor_SMD</text:p>
          </table:table-cell>
          <table:table-cell office:value-type="string" calcext:value-type="string">
            <text:p>C_0805_2012Metric</text:p>
          </table:table-cell>
          <table:table-cell office:value-type="string" calcext:value-type="string">
            <text:p>1uF</text:p>
          </table:table-cell>
          <table:table-cell office:value-type="float" office:value="4" calcext:value-type="float">
            <text:p>4</text:p>
          </table:table-cell>
          <table:table-cell office:value-type="float" office:value="19.9" calcext:value-type="float">
            <text:p>19,90</text:p>
          </table:table-cell>
          <table:table-cell office:value-type="float" office:value="100" calcext:value-type="float">
            <text:p>100</text:p>
          </table:table-cell>
          <table:table-cell table:formula="of:=[.E5]/[.F5]*[.D5]" office:value-type="float" office:value="0.796" calcext:value-type="float">
            <text:p>0,80</text:p>
          </table:table-cell>
          <table:table-cell office:value-type="string" calcext:value-type="string">
            <text:p><text:a xlink:href="https://www.mercadolivre.com.br/kit-100-pecas-capacitor-ceramico-smd-0805-1uf-25v-x7r-10/up/MLBU3756911618?pdp_filters=item_id%3AMLB6194980832&amp;matt_tool=38524122#origin=share&amp;sid=share&amp;wid=MLB6194980832&amp;action=copy" xlink:type="simple">https://www.mercadolivre.com.br/kit-100-pecas-capacitor-ceramico-smd-0805-1uf-25v-x7r-10/up/MLBU3756911618?pdp_filters=item_id%3AMLB6194980832&amp;matt_tool=38524122#origin=share&amp;sid=share&amp;wid=MLB6194980832&amp;action=copy</text:a></text:p>
          </table:table-cell>
          <table:table-cell/>
          <table:covered-table-cell table:number-columns-repeated="3" table:style-name="ce14"/>
        </table:table-row>
        <table:table-row table:style-name="ro2">
          <table:table-cell office:value-type="string" calcext:value-type="string">
            <text:p>Diode_THT</text:p>
          </table:table-cell>
          <table:table-cell office:value-type="string" calcext:value-type="string">
            <text:p>D_DO-35_SOD27_P7.62mm_Horizontal</text:p>
          </table:table-cell>
          <table:table-cell office:value-type="string" calcext:value-type="string">
            <text:p>1N4148</text:p>
          </table:table-cell>
          <table:table-cell office:value-type="float" office:value="8" calcext:value-type="float">
            <text:p>8</text:p>
          </table:table-cell>
          <table:table-cell office:value-type="float" office:value="74.99" calcext:value-type="float">
            <text:p>74,99</text:p>
          </table:table-cell>
          <table:table-cell office:value-type="float" office:value="1000" calcext:value-type="float">
            <text:p>1000</text:p>
          </table:table-cell>
          <table:table-cell table:formula="of:=[.E6]/[.F6]*[.D6]" office:value-type="float" office:value="0.59992" calcext:value-type="float">
            <text:p>0,60</text:p>
          </table:table-cell>
          <table:table-cell office:value-type="string" calcext:value-type="string">
            <text:p><text:a xlink:href="https://www.mercadolivre.com.br/diodo-de-sinal-1n4148-do35-fitado-1000-pecas/up/MLBU1162432908?pdp_filters=item_id%3AMLB4169150254&amp;matt_tool=38524122#origin=share&amp;sid=share&amp;wid=MLB4169150254&amp;action=copy" xlink:type="simple">https://www.mercadolivre.com.br/diodo-de-sinal-1n4148-do35-fitado-1000-pecas/up/MLBU1162432908?pdp_filters=item_id%3AMLB4169150254&amp;matt_tool=38524122#origin=share&amp;sid=share&amp;wid=MLB4169150254&amp;action=copy</text:a>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ED_THT</text:p>
          </table:table-cell>
          <table:table-cell office:value-type="string" calcext:value-type="string">
            <text:p>LED_D3.0mm</text:p>
          </table:table-cell>
          <table:table-cell office:value-type="string" calcext:value-type="string">
            <text:p>LED</text:p>
          </table:table-cell>
          <table:table-cell office:value-type="float" office:value="4" calcext:value-type="float">
            <text:p>4</text:p>
          </table:table-cell>
          <table:table-cell office:value-type="float" office:value="12.99" calcext:value-type="float">
            <text:p>12,99</text:p>
          </table:table-cell>
          <table:table-cell office:value-type="float" office:value="100" calcext:value-type="float">
            <text:p>100</text:p>
          </table:table-cell>
          <table:table-cell table:formula="of:=[.E7]/[.F7]*[.D7]" office:value-type="float" office:value="0.5196" calcext:value-type="float">
            <text:p>0,52</text:p>
          </table:table-cell>
          <table:table-cell office:value-type="string" calcext:value-type="string">
            <text:p><text:a xlink:href="https://www.mercadolivre.com.br/led-3mm-vermelho-difuso-comum-pacote-100-pecas/up/MLBU596105315?pdp_filters=item_id%3AMLB1521156773&amp;matt_tool=38524122#origin=share&amp;sid=share&amp;wid=MLB1521156773&amp;action=copy" xlink:type="simple">https://www.mercadolivre.com.br/led-3mm-vermelho-difuso-comum-pacote-100-pecas/up/MLBU596105315?pdp_filters=item_id%3AMLB1521156773&amp;matt_tool=38524122#origin=share&amp;sid=share&amp;wid=MLB1521156773&amp;action=copy</text:a></text:p>
          </table:table-cell>
          <table:table-cell/>
          <table:table-cell table:style-name="ce36" office:value-type="string" calcext:value-type="string" table:number-columns-spanned="3" table:number-rows-spanned="2">
            <text:p>Custo da PCB (PCBWay)</text:p>
          </table:table-cell>
          <table:covered-table-cell table:number-columns-repeated="2" table:style-name="ce14"/>
        </table:table-row>
        <table:table-row table:style-name="ro2">
          <table:table-cell office:value-type="string" calcext:value-type="string">
            <text:p>TerminalBlock_Phoenix</text:p>
          </table:table-cell>
          <table:table-cell office:value-type="string" calcext:value-type="string">
            <text:p>TerminalBlock_Phoenix_MKDS-1,5-3_1x03_P5.00mm_Horizontal</text:p>
          </table:table-cell>
          <table:table-cell office:value-type="string" calcext:value-type="string">
            <text:p>Conn_01x0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,00</text:p>
          </table:table-cell>
          <table:table-cell office:value-type="float" office:value="10" calcext:value-type="float">
            <text:p>10</text:p>
          </table:table-cell>
          <table:table-cell table:formula="of:=[.E8]/[.F8]*[.D8]" office:value-type="float" office:value="8" calcext:value-type="float">
            <text:p>8,00</text:p>
          </table:table-cell>
          <table:table-cell office:value-type="string" calcext:value-type="string">
            <text:p><text:a xlink:href="https://www.mercadolivre.com.br/10-pecas--borne-kre-3vias-verde-kf1283t-508mm-promocao/up/MLBU1425091365?pdp_filters=item_id%3AMLB2739888366&amp;from=gshop&amp;matt_tool=19390443&amp;matt_word=&amp;matt_source=google&amp;matt_campaign_id=22090354205&amp;matt_ad_group_id=191786774561&amp;matt_match_type=&amp;matt_network=g&amp;matt_device=c&amp;matt_creative=782869962440&amp;matt_keyword=&amp;matt_ad_position=&amp;matt_ad_type=pla&amp;matt_merchant_id=5526900012&amp;matt_product_id=MLBU1425091365&amp;matt_product_partition_id=2470936418360&amp;matt_target_id=pla-2470936418360&amp;cq_src=google_ads&amp;cq_cmp=22090354205&amp;cq_net=g&amp;cq_plt=gp&amp;cq_med=pla&amp;gad_source=1&amp;gad_campaignid=22090354205&amp;gclid=CjwKCAjwuanRBhBSEiwAY5y6VxqICkcHHoEtgmlxMJ2RLWk76G1Cq98AOlJc8RAX3IsvOxMlNPADihoCmNMQAvD_BwE" xlink:type="simple">https://www.mercadolivre.com.br/10-pecas--borne-kre-3vias-verde-kf1283t-508mm-promocao/up/MLBU1425091365?pdp_filters=item_id%3AMLB2739888366&amp;from=gshop&amp;matt_tool=19390443&amp;matt_word=&amp;matt_source=google&amp;matt_campaign_id=22090354205&amp;matt_ad_group_id=191786774561&amp;matt_match_type=&amp;matt_network=g&amp;matt_device=c&amp;matt_creative=782869962440&amp;matt_keyword=&amp;matt_ad_position=&amp;matt_ad_type=pla&amp;matt_merchant_id=5526900012&amp;matt_product_id=MLBU1425091365&amp;matt_product_partition_id=2470936418360&amp;matt_target_id=pla-2470936418360&amp;cq_src=google_ads&amp;cq_cmp=22090354205&amp;cq_net=g&amp;cq_plt=gp&amp;cq_med=pla&amp;gad_source=1&amp;gad_campaignid=22090354205&amp;gclid=CjwKCAjwuanRBhBSEiwAY5y6VxqICkcHHoEtgmlxMJ2RLWk76G1Cq98AOlJc8RAX3IsvOxMlNPADihoCmNMQAvD_BwE</text:a></text:p>
          </table:table-cell>
          <table:table-cell/>
          <table:covered-table-cell table:number-columns-repeated="3" table:style-name="ce14"/>
        </table:table-row>
        <table:table-row table:style-name="ro2">
          <table:table-cell office:value-type="string" calcext:value-type="string">
            <text:p>TerminalBlock_Phoenix</text:p>
          </table:table-cell>
          <table:table-cell office:value-type="string" calcext:value-type="string">
            <text:p>TerminalBlock_Phoenix_MKDS-1,5-2_1x02_P5.00mm_Horizontal</text:p>
          </table:table-cell>
          <table:table-cell office:value-type="string" calcext:value-type="string">
            <text:p>Conn_01x02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,00</text:p>
          </table:table-cell>
          <table:table-cell table:style-name="ce11" office:value-type="float" office:value="10" calcext:value-type="float">
            <text:p>10</text:p>
          </table:table-cell>
          <table:table-cell table:formula="of:=[.E9]/[.F9]*[.D9]" office:value-type="float" office:value="7.6" calcext:value-type="float">
            <text:p>7,60</text:p>
          </table:table-cell>
          <table:table-cell office:value-type="string" calcext:value-type="string">
            <text:p><text:a xlink:href="https://www.mercadolivre.com.br/borne-kre-2vias-verde-kf1282t-508mm-kit-c10pcs-oferta/up/MLBU1721454400?pdp_filters=item_id%3AMLB2165510552&amp;matt_tool=38524122#origin=share&amp;sid=share&amp;wid=MLB2165510552&amp;action=copy" xlink:type="simple">https://www.mercadolivre.com.br/borne-kre-2vias-verde-kf1282t-508mm-kit-c10pcs-oferta/up/MLBU1721454400?pdp_filters=item_id%3AMLB2165510552&amp;matt_tool=38524122#origin=share&amp;sid=share&amp;wid=MLB2165510552&amp;action=copy</text:a></text:p>
          </table:table-cell>
          <table:table-cell/>
          <table:table-cell table:style-name="ce38" office:value-type="float" office:value="88.13" calcext:value-type="float" table:number-columns-spanned="3" table:number-rows-spanned="2">
            <text:p>88,13</text:p>
          </table:table-cell>
          <table:covered-table-cell table:number-columns-repeated="2" table:style-name="ce14"/>
        </table:table-row>
        <table:table-row table:style-name="ro2">
          <table:table-cell office:value-type="string" calcext:value-type="string">
            <text:p>Connector_IDC</text:p>
          </table:table-cell>
          <table:table-cell office:value-type="string" calcext:value-type="string">
            <text:p>IDC-Header_2x05_P2.54mm_Vertical</text:p>
          </table:table-cell>
          <table:table-cell office:value-type="string" calcext:value-type="string">
            <text:p>Conn_02x05_Odd_Even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,00</text:p>
          </table:table-cell>
          <table:table-cell office:value-type="float" office:value="10" calcext:value-type="float">
            <text:p>10</text:p>
          </table:table-cell>
          <table:table-cell table:formula="of:=[.E10]/[.F10]*[.D10]" office:value-type="float" office:value="3" calcext:value-type="float">
            <text:p>3,00</text:p>
          </table:table-cell>
          <table:table-cell office:value-type="string" calcext:value-type="string">
            <text:p><text:a xlink:href="https://www.mercadolivre.com.br/10pc-conector-idc-10vias-de-transicao-idct10-passo-254mm/up/MLBU4009714486?pdp_filters=item_id%3AMLB4708874677&amp;matt_tool=38524122#origin=share&amp;sid=share&amp;wid=MLB4708874677&amp;action=copy" xlink:type="simple">https://www.mercadolivre.com.br/10pc-conector-idc-10vias-de-transicao-idct10-passo-254mm/up/MLBU4009714486?pdp_filters=item_id%3AMLB4708874677&amp;matt_tool=38524122#origin=share&amp;sid=share&amp;wid=MLB4708874677&amp;action=copy</text:a></text:p>
          </table:table-cell>
          <table:table-cell/>
          <table:covered-table-cell table:number-columns-repeated="3" table:style-name="ce14"/>
        </table:table-row>
        <table:table-row table:style-name="ro2">
          <table:table-cell office:value-type="string" calcext:value-type="string">
            <text:p>Connector_PinHeader_2.54mm</text:p>
          </table:table-cell>
          <table:table-cell office:value-type="string" calcext:value-type="string">
            <text:p>PinHeader_1x03_P2.54mm_Vertical</text:p>
          </table:table-cell>
          <table:table-cell office:value-type="string" calcext:value-type="string">
            <text:p>Conn_01x03</text:p>
          </table:table-cell>
          <table:table-cell office:value-type="float" office:value="4" calcext:value-type="float">
            <text:p>4</text:p>
          </table:table-cell>
          <table:table-cell office:value-type="float" office:value="16.99" calcext:value-type="float">
            <text:p>16,99</text:p>
          </table:table-cell>
          <table:table-cell office:value-type="float" office:value="50" calcext:value-type="float">
            <text:p>50</text:p>
          </table:table-cell>
          <table:table-cell table:formula="of:=[.E11]/[.F11]*[.D11]" office:value-type="float" office:value="1.3592" calcext:value-type="float">
            <text:p>1,36</text:p>
          </table:table-cell>
          <table:table-cell office:value-type="string" calcext:value-type="string">
            <text:p><text:a xlink:href="https://www.mercadolivre.com.br/10pc-conector-idc-10vias-de-transicao-idct10-passo-254mm/up/MLBU4009714486?pdp_filters=item_id%3AMLB4708874677&amp;matt_tool=38524122#origin=share&amp;sid=share&amp;wid=MLB4708874677&amp;action=copy" xlink:type="simple">https://www.mercadolivre.com.br/10pc-conector-idc-10vias-de-transicao-idct10-passo-254mm/up/MLBU4009714486?pdp_filters=item_id%3AMLB4708874677&amp;matt_tool=38524122#origin=share&amp;sid=share&amp;wid=MLB4708874677&amp;action=copy</text:a>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nnector_Dsub</text:p>
          </table:table-cell>
          <table:table-cell office:value-type="string" calcext:value-type="string">
            <text:p>DSUB-9_Pins_Vertical_P2.77x2.84mm_MountingHoles</text:p>
          </table:table-cell>
          <table:table-cell office:value-type="string" calcext:value-type="string">
            <text:p>DE9_Pins_MountingHoles</text:p>
          </table:table-cell>
          <table:table-cell office:value-type="float" office:value="1" calcext:value-type="float">
            <text:p>1</text:p>
          </table:table-cell>
          <table:table-cell office:value-type="float" office:value="7.68" calcext:value-type="float">
            <text:p>7,68</text:p>
          </table:table-cell>
          <table:table-cell office:value-type="float" office:value="1" calcext:value-type="float">
            <text:p>1</text:p>
          </table:table-cell>
          <table:table-cell table:formula="of:=[.E12]/[.F12]*[.D12]" office:value-type="float" office:value="7.68" calcext:value-type="float">
            <text:p>7,68</text:p>
          </table:table-cell>
          <table:table-cell office:value-type="string" calcext:value-type="string">
            <text:p><text:a xlink:href="https://www.metabee.com/renhotec-d-sub-9-pin-standard-male-connector-for-pcb-mount-through-hole-2-77mm-pitch.html?srsltid=AfmBOoqvglgvuJdGO0zOOgRncShFqpBSOBhXFzV5x-r4_hcYj4pBK8g1H1Q" xlink:type="simple">https://www.metabee.com/renhotec-d-sub-9-pin-standard-male-connector-for-pcb-mount-through-hole-2-77mm-pitch.html?srsltid=AfmBOoqvglgvuJdGO0zOOgRncShFqpBSOBhXFzV5x-r4_hcYj4pBK8g1H1Q</text:a></text:p>
          </table:table-cell>
          <table:table-cell/>
          <table:table-cell table:style-name="ce39" office:value-type="string" calcext:value-type="string" table:number-columns-spanned="3" table:number-rows-spanned="2">
            <text:p>Custo total</text:p>
          </table:table-cell>
          <table:covered-table-cell table:number-columns-repeated="2" table:style-name="ce14"/>
        </table:table-row>
        <table:table-row table:style-name="ro2">
          <table:table-cell office:value-type="string" calcext:value-type="string">
            <text:p>Connector_IDC</text:p>
          </table:table-cell>
          <table:table-cell office:value-type="string" calcext:value-type="string">
            <text:p>IDC-Header_2x04_P2.54mm_Vertical</text:p>
          </table:table-cell>
          <table:table-cell office:value-type="string" calcext:value-type="string">
            <text:p>Conn_02x04_Odd_Even</text:p>
          </table:table-cell>
          <table:table-cell office:value-type="float" office:value="1" calcext:value-type="float">
            <text:p>1</text:p>
          </table:table-cell>
          <table:table-cell office:value-type="float" office:value="2.17" calcext:value-type="float">
            <text:p>2,17</text:p>
          </table:table-cell>
          <table:table-cell office:value-type="float" office:value="1" calcext:value-type="float">
            <text:p>1</text:p>
          </table:table-cell>
          <table:table-cell table:formula="of:=[.E13]/[.F13]*[.D13]" office:value-type="float" office:value="2.17" calcext:value-type="float">
            <text:p>2,17</text:p>
          </table:table-cell>
          <table:table-cell office:value-type="string" calcext:value-type="string">
            <text:p><text:a xlink:href="https://www.elecbee.com/en/product-detail/elecbee-wire-to-board-pin-header-2-54mm-pitch-2x4pin-through-hole-straight-pbt-black_137516?srsltid=AfmBOoq0DJFd15sjiXYFebhclOKqqJBG8H_VHgznns0Zlavd3fMN_bC8Bzc" xlink:type="simple">https://www.elecbee.com/en/product-detail/elecbee-wire-to-board-pin-header-2-54mm-pitch-2x4pin-through-hole-straight-pbt-black_137516?srsltid=AfmBOoq0DJFd15sjiXYFebhclOKqqJBG8H_VHgznns0Zlavd3fMN_bC8Bzc</text:a></text:p>
          </table:table-cell>
          <table:table-cell/>
          <table:covered-table-cell table:number-columns-repeated="3" table:style-name="ce14"/>
        </table:table-row>
        <table:table-row table:style-name="ro2">
          <table:table-cell office:value-type="string" calcext:value-type="string">
            <text:p>TerminalBlock_Phoenix</text:p>
          </table:table-cell>
          <table:table-cell office:value-type="string" calcext:value-type="string">
            <text:p>TerminalBlock_Phoenix_MKDS-1,5-3-5.08_1x03_P5.08mm_Horizontal</text:p>
          </table:table-cell>
          <table:table-cell office:value-type="string" calcext:value-type="string">
            <text:p>Screw_Terminal_01x0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,00</text:p>
          </table:table-cell>
          <table:table-cell office:value-type="float" office:value="10" calcext:value-type="float">
            <text:p>10</text:p>
          </table:table-cell>
          <table:table-cell table:formula="of:=[.E14]/[.F14]*[.D14]" office:value-type="float" office:value="2" calcext:value-type="float">
            <text:p>2,00</text:p>
          </table:table-cell>
          <table:table-cell office:value-type="string" calcext:value-type="string">
            <text:p><text:a xlink:href="https://www.mercadolivre.com.br/10-pecas--borne-kre-3vias-verde-kf1283t-508mm-promocao/up/MLBU1425091365?pdp_filters=item_id%3AMLB2739888366&amp;matt_tool=38524122#origin=share&amp;sid=share&amp;wid=MLB2739888366&amp;action=copy" xlink:type="simple">https://www.mercadolivre.com.br/10-pecas--borne-kre-3vias-verde-kf1283t-508mm-promocao/up/MLBU1425091365?pdp_filters=item_id%3AMLB2739888366&amp;matt_tool=38524122#origin=share&amp;sid=share&amp;wid=MLB2739888366&amp;action=copy</text:a></text:p>
          </table:table-cell>
          <table:table-cell/>
          <table:table-cell table:style-name="ce39" table:formula="of:=SUM([.J9];[.J4])" office:value-type="float" office:value="504.81462" calcext:value-type="float" table:number-columns-spanned="3" table:number-rows-spanned="2">
            <text:p>504,81462</text:p>
          </table:table-cell>
          <table:covered-table-cell table:number-columns-repeated="2" table:style-name="ce14"/>
        </table:table-row>
        <table:table-row table:style-name="ro2">
          <table:table-cell office:value-type="string" calcext:value-type="string">
            <text:p>Relay_THT</text:p>
          </table:table-cell>
          <table:table-cell office:value-type="string" calcext:value-type="string">
            <text:p>Relay_SPDT_SANYOU_SRD_Series_Form_C</text:p>
          </table:table-cell>
          <table:table-cell office:value-type="string" calcext:value-type="string">
            <text:p>SANYOU_SRD_Form_C</text:p>
          </table:table-cell>
          <table:table-cell office:value-type="float" office:value="4" calcext:value-type="float">
            <text:p>4</text:p>
          </table:table-cell>
          <table:table-cell office:value-type="float" office:value="27.51" calcext:value-type="float">
            <text:p>27,51</text:p>
          </table:table-cell>
          <table:table-cell office:value-type="float" office:value="8" calcext:value-type="float">
            <text:p>8</text:p>
          </table:table-cell>
          <table:table-cell table:formula="of:=[.E15]/[.F15]*[.D15]" office:value-type="float" office:value="13.755" calcext:value-type="float">
            <text:p>13,76</text:p>
          </table:table-cell>
          <table:table-cell office:value-type="string" calcext:value-type="string">
            <text:p><text:a xlink:href="https://www.mercadolivre.com.br/8-reles-srd-12v-10a-5-pinos-arduino/up/MLBU3628947135?pdp_filters=item_id%3AMLB5975838570&amp;matt_tool=38524122#origin=share&amp;sid=share&amp;wid=MLB5975838570&amp;action=copy" xlink:type="simple">https://www.mercadolivre.com.br/8-reles-srd-12v-10a-5-pinos-arduino/up/MLBU3628947135?pdp_filters=item_id%3AMLB5975838570&amp;matt_tool=38524122#origin=share&amp;sid=share&amp;wid=MLB5975838570&amp;action=copy</text:a></text:p>
          </table:table-cell>
          <table:table-cell/>
          <table:covered-table-cell table:number-columns-repeated="3" table:style-name="ce14"/>
        </table:table-row>
        <table:table-row table:style-name="ro2">
          <table:table-cell office:value-type="string" calcext:value-type="string">
            <text:p>Converter_DCDC</text:p>
          </table:table-cell>
          <table:table-cell office:value-type="string" calcext:value-type="string">
            <text:p>Converter_DCDC_Murata_CRE1xxxxxxSC_THT</text:p>
          </table:table-cell>
          <table:table-cell office:value-type="string" calcext:value-type="string">
            <text:p>MEE1S0505SC</text:p>
          </table:table-cell>
          <table:table-cell office:value-type="float" office:value="1" calcext:value-type="float">
            <text:p>1</text:p>
          </table:table-cell>
          <table:table-cell office:value-type="float" office:value="23.94" calcext:value-type="float">
            <text:p>23,94</text:p>
          </table:table-cell>
          <table:table-cell office:value-type="float" office:value="1" calcext:value-type="float">
            <text:p>1</text:p>
          </table:table-cell>
          <table:table-cell table:formula="of:=[.E16]/[.F16]*[.D16]" office:value-type="float" office:value="23.94" calcext:value-type="float">
            <text:p>23,94</text:p>
          </table:table-cell>
          <table:table-cell office:value-type="string" calcext:value-type="string">
            <text:p><text:a xlink:href="https://www.sager.com/product/mee1s0505sc-murata-power-solutions/3810040?utm_source=octopart&amp;utm_medium=ppc&amp;utm_campaign=sager-brand" xlink:type="simple">https://www.sager.com/product/mee1s0505sc-murata-power-solutions/3810040?utm_source=octopart&amp;utm_medium=ppc&amp;utm_campaign=sager-brand</text:a>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ackage_TO_SOT_THT</text:p>
          </table:table-cell>
          <table:table-cell office:value-type="string" calcext:value-type="string">
            <text:p>TO-92_Inline</text:p>
          </table:table-cell>
          <table:table-cell office:value-type="string" calcext:value-type="string">
            <text:p>BC337</text:p>
          </table:table-cell>
          <table:table-cell office:value-type="float" office:value="4" calcext:value-type="float">
            <text:p>4</text:p>
          </table:table-cell>
          <table:table-cell office:value-type="float" office:value="10.99" calcext:value-type="float">
            <text:p>10,99</text:p>
          </table:table-cell>
          <table:table-cell office:value-type="float" office:value="10" calcext:value-type="float">
            <text:p>10</text:p>
          </table:table-cell>
          <table:table-cell table:formula="of:=[.E17]/[.F17]*[.D17]" office:value-type="float" office:value="4.396" calcext:value-type="float">
            <text:p>4,40</text:p>
          </table:table-cell>
          <table:table-cell office:value-type="string" calcext:value-type="string">
            <text:p><text:a xlink:href="https://www.mercadolivre.com.br/kit-com-10---bc33725-transistor-to92-npn-45v-800ma-bipola/up/MLBU3248955014?pdp_filters=item_id%3AMLB4099112629&amp;matt_tool=38524122#origin=share&amp;sid=share&amp;wid=MLB4099112629&amp;action=copy" xlink:type="simple">https://www.mercadolivre.com.br/kit-com-10---bc33725-transistor-to92-npn-45v-800ma-bipola/up/MLBU3248955014?pdp_filters=item_id%3AMLB4099112629&amp;matt_tool=38524122#origin=share&amp;sid=share&amp;wid=MLB4099112629&amp;action=copy</text:a>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esistor_SMD</text:p>
          </table:table-cell>
          <table:table-cell office:value-type="string" calcext:value-type="string">
            <text:p>R_0805_2012Metric</text:p>
          </table:table-cell>
          <table:table-cell office:value-type="string" calcext:value-type="string">
            <text:p>10K</text:p>
          </table:table-cell>
          <table:table-cell office:value-type="float" office:value="6" calcext:value-type="float">
            <text:p>6</text:p>
          </table:table-cell>
          <table:table-cell office:value-type="float" office:value="12.54" calcext:value-type="float">
            <text:p>12,54</text:p>
          </table:table-cell>
          <table:table-cell office:value-type="float" office:value="100" calcext:value-type="float">
            <text:p>100</text:p>
          </table:table-cell>
          <table:table-cell table:formula="of:=[.E18]/[.F18]*[.D18]" office:value-type="float" office:value="0.7524" calcext:value-type="float">
            <text:p>0,75</text:p>
          </table:table-cell>
          <table:table-cell office:value-type="string" calcext:value-type="string">
            <text:p><text:a xlink:href="https://www.mercadolivre.com.br/100x-resistor-10k-0805-5-smd-125x2mm/up/MLBU2220601703?pdp_filters=item_id%3AMLB3174621306&amp;from=gshop&amp;matt_tool=19390443&amp;matt_word=&amp;matt_source=google&amp;matt_campaign_id=22090354205&amp;matt_ad_group_id=191786774561&amp;matt_match_type=&amp;matt_network=g&amp;matt_device=c&amp;matt_creative=782869962440&amp;matt_keyword=&amp;matt_ad_position=&amp;matt_ad_type=pla&amp;matt_merchant_id=585335140&amp;matt_product_id=MLBU2220601703&amp;matt_product_partition_id=2388513386149&amp;matt_target_id=pla-2388513386149&amp;cq_src=google_ads&amp;cq_cmp=22090354205&amp;cq_net=g&amp;cq_plt=gp&amp;cq_med=pla&amp;gad_source=1&amp;gad_campaignid=22090354205&amp;gclid=CjwKCAjwuanRBhBSEiwAY5y6Vw07L7Rz2KrGxhbU4t-AGHuPJG_u_eDaFNrJ5RbXIQKxXGGsGdbyohoC9DYQAvD_BwE" xlink:type="simple">https://www.mercadolivre.com.br/100x-resistor-10k-0805-5-smd-125x2mm/up/MLBU2220601703?pdp_filters=item_id%3AMLB3174621306&amp;from=gshop&amp;matt_tool=19390443&amp;matt_word=&amp;matt_source=google&amp;matt_campaign_id=22090354205&amp;matt_ad_group_id=191786774561&amp;matt_match_type=&amp;matt_network=g&amp;matt_device=c&amp;matt_creative=782869962440&amp;matt_keyword=&amp;matt_ad_position=&amp;matt_ad_type=pla&amp;matt_merchant_id=585335140&amp;matt_product_id=MLBU2220601703&amp;matt_product_partition_id=2388513386149&amp;matt_target_id=pla-2388513386149&amp;cq_src=google_ads&amp;cq_cmp=22090354205&amp;cq_net=g&amp;cq_plt=gp&amp;cq_med=pla&amp;gad_source=1&amp;gad_campaignid=22090354205&amp;gclid=CjwKCAjwuanRBhBSEiwAY5y6Vw07L7Rz2KrGxhbU4t-AGHuPJG_u_eDaFNrJ5RbXIQKxXGGsGdbyohoC9DYQAvD_BwE</text:a>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esistor_THT</text:p>
          </table:table-cell>
          <table:table-cell office:value-type="string" calcext:value-type="string">
            <text:p>R_Axial_DIN0207_L6.3mm_D2.5mm_P7.62mm_Horizontal</text:p>
          </table:table-cell>
          <table:table-cell office:value-type="string" calcext:value-type="string">
            <text:p>15K</text:p>
          </table:table-cell>
          <table:table-cell office:value-type="float" office:value="4" calcext:value-type="float">
            <text:p>4</text:p>
          </table:table-cell>
          <table:table-cell office:value-type="float" office:value="19.9" calcext:value-type="float">
            <text:p>19,90</text:p>
          </table:table-cell>
          <table:table-cell office:value-type="float" office:value="100" calcext:value-type="float">
            <text:p>100</text:p>
          </table:table-cell>
          <table:table-cell table:formula="of:=[.E19]/[.F19]*[.D19]" office:value-type="float" office:value="0.796" calcext:value-type="float">
            <text:p>0,80</text:p>
          </table:table-cell>
          <table:table-cell office:value-type="string" calcext:value-type="string">
            <text:p><text:a xlink:href="https://www.mercadolivre.com.br/kit-100-unidades-resistor-15k-5-14w/up/MLBU3013017251?pdp_filters=item_id%3AMLB3976721807&amp;matt_tool=38524122#origin=share&amp;sid=share&amp;wid=MLB3976721807&amp;action=copy" xlink:type="simple">https://www.mercadolivre.com.br/kit-100-unidades-resistor-15k-5-14w/up/MLBU3013017251?pdp_filters=item_id%3AMLB3976721807&amp;matt_tool=38524122#origin=share&amp;sid=share&amp;wid=MLB3976721807&amp;action=copy</text:a>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esistor_SMD</text:p>
          </table:table-cell>
          <table:table-cell office:value-type="string" calcext:value-type="string">
            <text:p>R_1206_3216Metric_Pad1.30x1.75mm_HandSolder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11.5" calcext:value-type="float">
            <text:p>11,50</text:p>
          </table:table-cell>
          <table:table-cell office:value-type="float" office:value="30" calcext:value-type="float">
            <text:p>30</text:p>
          </table:table-cell>
          <table:table-cell table:formula="of:=[.E20]/[.F20]*[.D20]" office:value-type="float" office:value="3.06666666666667" calcext:value-type="float">
            <text:p>3,07</text:p>
          </table:table-cell>
          <table:table-cell office:value-type="string" calcext:value-type="string">
            <text:p><text:a xlink:href="https://www.mercadolivre.com.br/30x-resistor-100r-1206-5-smd-16x32mm/up/MLBU1443383442?pdp_filters=item_id%3AMLB3149439211&amp;matt_tool=38524122#origin=share&amp;sid=share&amp;wid=MLB3149439211&amp;action=copy" xlink:type="simple">https://www.mercadolivre.com.br/30x-resistor-100r-1206-5-smd-16x32mm/up/MLBU1443383442?pdp_filters=item_id%3AMLB3149439211&amp;matt_tool=38524122#origin=share&amp;sid=share&amp;wid=MLB3149439211&amp;action=copy</text:a>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esistor_SMD</text:p>
          </table:table-cell>
          <table:table-cell office:value-type="string" calcext:value-type="string">
            <text:p>R_1206_3216Metric_Pad1.30x1.75mm_HandSolder</text:p>
          </table:table-cell>
          <table:table-cell office:value-type="string" calcext:value-type="string">
            <text:p>10K</text:p>
          </table:table-cell>
          <table:table-cell office:value-type="float" office:value="4" calcext:value-type="float">
            <text:p>4</text:p>
          </table:table-cell>
          <table:table-cell office:value-type="float" office:value="19.9" calcext:value-type="float">
            <text:p>19,90</text:p>
          </table:table-cell>
          <table:table-cell office:value-type="float" office:value="30" calcext:value-type="float">
            <text:p>30</text:p>
          </table:table-cell>
          <table:table-cell table:formula="of:=[.E21]/[.F21]*[.D21]" office:value-type="float" office:value="2.65333333333333" calcext:value-type="float">
            <text:p>2,65</text:p>
          </table:table-cell>
          <table:table-cell office:value-type="string" calcext:value-type="string">
            <text:p><text:a xlink:href="https://www.mercadolivre.com.br/10k-30-pecasresistor-smd-10k-1-1206-32mm-x16mm-1002/up/MLBU2905965901?pdp_filters=item_id%3AMLB5229270104&amp;matt_tool=38524122#origin=share&amp;sid=share&amp;wid=MLB5229270104&amp;action=copy" xlink:type="simple">https://www.mercadolivre.com.br/10k-30-pecasresistor-smd-10k-1-1206-32mm-x16mm-1002/up/MLBU2905965901?pdp_filters=item_id%3AMLB5229270104&amp;matt_tool=38524122#origin=share&amp;sid=share&amp;wid=MLB5229270104&amp;action=copy</text:a>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esistor_THT</text:p>
          </table:table-cell>
          <table:table-cell office:value-type="string" calcext:value-type="string">
            <text:p>R_Axial_DIN0207_L6.3mm_D2.5mm_P7.62mm_Horizontal</text:p>
          </table:table-cell>
          <table:table-cell office:value-type="string" calcext:value-type="string">
            <text:p>10K</text:p>
          </table:table-cell>
          <table:table-cell office:value-type="float" office:value="4" calcext:value-type="float">
            <text:p>4</text:p>
          </table:table-cell>
          <table:table-cell office:value-type="float" office:value="18.9" calcext:value-type="float">
            <text:p>18,90</text:p>
          </table:table-cell>
          <table:table-cell office:value-type="float" office:value="200" calcext:value-type="float">
            <text:p>200</text:p>
          </table:table-cell>
          <table:table-cell table:formula="of:=[.E22]/[.F22]*[.D22]" office:value-type="float" office:value="0.378" calcext:value-type="float">
            <text:p>0,38</text:p>
          </table:table-cell>
          <table:table-cell office:value-type="string" calcext:value-type="string">
            <text:p><text:a xlink:href="https://www.mercadolivre.com.br/kit-200-unidades-resistor-10k-5-14w/up/MLBU1966352837?pdp_filters=item_id%3AMLB2644215985&amp;matt_tool=38524122#origin=share&amp;sid=share&amp;wid=MLB2644215985&amp;action=copy" xlink:type="simple">https://www.mercadolivre.com.br/kit-200-unidades-resistor-10k-5-14w/up/MLBU1966352837?pdp_filters=item_id%3AMLB2644215985&amp;matt_tool=38524122#origin=share&amp;sid=share&amp;wid=MLB2644215985&amp;action=copy</text:a>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otentiometer_THT</text:p>
          </table:table-cell>
          <table:table-cell office:value-type="string" calcext:value-type="string">
            <text:p>Potentiometer_Bourns_3296W_Vertical</text:p>
          </table:table-cell>
          <table:table-cell office:value-type="string" calcext:value-type="string">
            <text:p>10K</text:p>
          </table:table-cell>
          <table:table-cell office:value-type="float" office:value="5" calcext:value-type="float">
            <text:p>5</text:p>
          </table:table-cell>
          <table:table-cell office:value-type="float" office:value="18.42" calcext:value-type="float">
            <text:p>18,42</text:p>
          </table:table-cell>
          <table:table-cell table:style-name="ce11" office:value-type="float" office:value="10" calcext:value-type="float">
            <text:p>10</text:p>
          </table:table-cell>
          <table:table-cell table:formula="of:=[.E23]/[.F23]*[.D23]" office:value-type="float" office:value="9.21" calcext:value-type="float">
            <text:p>9,21</text:p>
          </table:table-cell>
          <table:table-cell office:value-type="string" calcext:value-type="string">
            <text:p><text:a xlink:href="https://www.mercadolivre.com.br/10-pecas-trimpot-3296w-10k-vertical-multivoltas-promoco/p/MLB2076037856?pdp_filters=item_id%3AMLB1586974261&amp;matt_tool=38524122#origin=share&amp;sid=share&amp;wid=MLB1586974261&amp;action=copy" xlink:type="simple">https://www.mercadolivre.com.br/10-pecas-trimpot-3296w-10k-vertical-multivoltas-promoco/p/MLB2076037856?pdp_filters=item_id%3AMLB1586974261&amp;matt_tool=38524122#origin=share&amp;sid=share&amp;wid=MLB1586974261&amp;action=copy</text:a>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utton_Switch_SMD</text:p>
          </table:table-cell>
          <table:table-cell office:value-type="string" calcext:value-type="string">
            <text:p>SW_Push_1P1T_NO_CK_KSC7xxJ</text:p>
          </table:table-cell>
          <table:table-cell office:value-type="string" calcext:value-type="string">
            <text:p>SW_Omron_B3FS</text:p>
          </table:table-cell>
          <table:table-cell office:value-type="float" office:value="17" calcext:value-type="float">
            <text:p>17</text:p>
          </table:table-cell>
          <table:table-cell office:value-type="float" office:value="23.41" calcext:value-type="float">
            <text:p>23,41</text:p>
          </table:table-cell>
          <table:table-cell office:value-type="float" office:value="100" calcext:value-type="float">
            <text:p>100</text:p>
          </table:table-cell>
          <table:table-cell table:formula="of:=[.E24]/[.F24]*[.D24]" office:value-type="float" office:value="3.9797" calcext:value-type="float">
            <text:p>3,98</text:p>
          </table:table-cell>
          <table:table-cell office:value-type="string" calcext:value-type="string">
            <text:p><text:a xlink:href="https://www.mercadolivre.com.br/100-pecas-micro-chave-push-button-4-pinos-protoboard-6x6x75/up/MLBU3016057330?pdp_filters=item_id%3AMLB3975705829&amp;matt_tool=38524122#origin=share&amp;sid=share&amp;wid=MLB3975705829&amp;action=copy" xlink:type="simple">https://www.mercadolivre.com.br/100-pecas-micro-chave-push-button-4-pinos-protoboard-6x6x75/up/MLBU3016057330?pdp_filters=item_id%3AMLB3975705829&amp;matt_tool=38524122#origin=share&amp;sid=share&amp;wid=MLB3975705829&amp;action=copy</text:a>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ackage_QFP</text:p>
          </table:table-cell>
          <table:table-cell office:value-type="string" calcext:value-type="string">
            <text:p>TQFP-100_14x14mm_P0.5mm</text:p>
          </table:table-cell>
          <table:table-cell office:value-type="string" calcext:value-type="string">
            <text:p>ATmega2560-16A</text:p>
          </table:table-cell>
          <table:table-cell office:value-type="float" office:value="1" calcext:value-type="float">
            <text:p>1</text:p>
          </table:table-cell>
          <table:table-cell office:value-type="float" office:value="106.2" calcext:value-type="float">
            <text:p>106,20</text:p>
          </table:table-cell>
          <table:table-cell office:value-type="float" office:value="1" calcext:value-type="float">
            <text:p>1</text:p>
          </table:table-cell>
          <table:table-cell table:formula="of:=[.E25]/[.F25]*[.D25]" office:value-type="float" office:value="106.2" calcext:value-type="float">
            <text:p>106,20</text:p>
          </table:table-cell>
          <table:table-cell office:value-type="string" calcext:value-type="string">
            <text:p><text:a xlink:href="https://www.multcomercial.com.br/microcontrolador-atmega2560-16au-tqfp100-atmel.html?gad_source=1&amp;gad_campaignid=21130617567&amp;gclid=CjwKCAjwuanRBhBSEiwAY5y6V4-Hnvb3KDnfVCTWefAj7khKaO13XZL7f8psQrFzXLSeVzbrBUUAGhoC5XMQAvD_BwE" xlink:type="simple">https://www.multcomercial.com.br/microcontrolador-atmega2560-16au-tqfp100-atmel.html?gad_source=1&amp;gad_campaignid=21130617567&amp;gclid=CjwKCAjwuanRBhBSEiwAY5y6V4-Hnvb3KDnfVCTWefAj7khKaO13XZL7f8psQrFzXLSeVzbrBUUAGhoC5XMQAvD_BwE</text:a>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ackage_DIP</text:p>
          </table:table-cell>
          <table:table-cell office:value-type="string" calcext:value-type="string">
            <text:p>DIP-6_W7.62mm</text:p>
          </table:table-cell>
          <table:table-cell office:value-type="string" calcext:value-type="string">
            <text:p>4N25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,00</text:p>
          </table:table-cell>
          <table:table-cell office:value-type="float" office:value="10" calcext:value-type="float">
            <text:p>10</text:p>
          </table:table-cell>
          <table:table-cell table:formula="of:=[.E26]/[.F26]*[.D26]" office:value-type="float" office:value="14" calcext:value-type="float">
            <text:p>14,00</text:p>
          </table:table-cell>
          <table:table-cell office:value-type="string" calcext:value-type="string">
            <text:p><text:a xlink:href="https://www.mercadolivre.com.br/ci-4n25--optoacoplador--dip--kit--10-pecas/up/MLBU1437719580?pdp_filters=item_id%3AMLB2809834010&amp;matt_tool=38524122#origin=share&amp;sid=share&amp;wid=MLB2809834010&amp;action=copy" xlink:type="simple">https://www.mercadolivre.com.br/ci-4n25--optoacoplador--dip--kit--10-pecas/up/MLBU1437719580?pdp_filters=item_id%3AMLB2809834010&amp;matt_tool=38524122#origin=share&amp;sid=share&amp;wid=MLB2809834010&amp;action=copy</text:a>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ackage_DIP</text:p>
          </table:table-cell>
          <table:table-cell office:value-type="string" calcext:value-type="string">
            <text:p>DIP-14_W7.62mm</text:p>
          </table:table-cell>
          <table:table-cell office:value-type="string" calcext:value-type="string">
            <text:p>TL084</text:p>
          </table:table-cell>
          <table:table-cell office:value-type="float" office:value="1" calcext:value-type="float">
            <text:p>1</text:p>
          </table:table-cell>
          <table:table-cell office:value-type="float" office:value="30.98" calcext:value-type="float">
            <text:p>30,98</text:p>
          </table:table-cell>
          <table:table-cell office:value-type="float" office:value="10" calcext:value-type="float">
            <text:p>10</text:p>
          </table:table-cell>
          <table:table-cell table:formula="of:=[.E27]/[.F27]*[.D27]" office:value-type="float" office:value="3.098" calcext:value-type="float">
            <text:p>3,10</text:p>
          </table:table-cell>
          <table:table-cell office:value-type="string" calcext:value-type="string">
            <text:p><text:a xlink:href="https://www.mercadolivre.com.br/circuito-integrado-de-10-pecas-tl084-dip-14-amplificador/p/MLB2076906861?pdp_filters=item_id%3AMLB4358511863&amp;matt_tool=38524122#origin=share&amp;sid=share&amp;wid=MLB4358511863&amp;action=copy" xlink:type="simple">https://www.mercadolivre.com.br/circuito-integrado-de-10-pecas-tl084-dip-14-amplificador/p/MLB2076906861?pdp_filters=item_id%3AMLB4358511863&amp;matt_tool=38524122#origin=share&amp;sid=share&amp;wid=MLB4358511863&amp;action=copy</text:a>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ackage_DIP</text:p>
          </table:table-cell>
          <table:table-cell office:value-type="string" calcext:value-type="string">
            <text:p>DIP-8_W7.62mm</text:p>
          </table:table-cell>
          <table:table-cell office:value-type="string" calcext:value-type="string">
            <text:p>6N137</text:p>
          </table:table-cell>
          <table:table-cell office:value-type="float" office:value="2" calcext:value-type="float">
            <text:p>2</text:p>
          </table:table-cell>
          <table:table-cell office:value-type="float" office:value="35.99" calcext:value-type="float">
            <text:p>35,99</text:p>
          </table:table-cell>
          <table:table-cell office:value-type="float" office:value="5" calcext:value-type="float">
            <text:p>5</text:p>
          </table:table-cell>
          <table:table-cell table:formula="of:=[.E28]/[.F28]*[.D28]" office:value-type="float" office:value="14.396" calcext:value-type="float">
            <text:p>14,40</text:p>
          </table:table-cell>
          <table:table-cell office:value-type="string" calcext:value-type="string">
            <text:p><text:a xlink:href="https://www.mercadolivre.com.br/5-pecas-ci-6n137-dip8-everligth/p/MLB53255257?pdp_filters=item_id%3AMLB4264245897&amp;matt_tool=38524122#origin=share&amp;sid=share&amp;wid=MLB4264245897&amp;action=copy" xlink:type="simple">https://www.mercadolivre.com.br/5-pecas-ci-6n137-dip8-everligth/p/MLB53255257?pdp_filters=item_id%3AMLB4264245897&amp;matt_tool=38524122#origin=share&amp;sid=share&amp;wid=MLB4264245897&amp;action=copy</text:a>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ackage_DIP</text:p>
          </table:table-cell>
          <table:table-cell office:value-type="string" calcext:value-type="string">
            <text:p>DIP-16_W7.62mm</text:p>
          </table:table-cell>
          <table:table-cell office:value-type="string" calcext:value-type="string">
            <text:p>MAX232</text:p>
          </table:table-cell>
          <table:table-cell office:value-type="float" office:value="1" calcext:value-type="float">
            <text:p>1</text:p>
          </table:table-cell>
          <table:table-cell office:value-type="float" office:value="42.08" calcext:value-type="float">
            <text:p>42,08</text:p>
          </table:table-cell>
          <table:table-cell office:value-type="float" office:value="10" calcext:value-type="float">
            <text:p>10</text:p>
          </table:table-cell>
          <table:table-cell table:formula="of:=[.E29]/[.F29]*[.D29]" office:value-type="float" office:value="4.208" calcext:value-type="float">
            <text:p>4,21</text:p>
          </table:table-cell>
          <table:table-cell office:value-type="string" calcext:value-type="string">
            <text:p><text:a xlink:href="https://www.mercadolivre.com.br/10x-circuito-integrado-max232cpe-max232-max232n-dip16/up/MLBU3335206018?pdp_filters=item_id%3AMLB5530394406&amp;matt_tool=38524122#origin=share&amp;sid=share&amp;wid=MLB5530394406&amp;action=copy" xlink:type="simple">https://www.mercadolivre.com.br/10x-circuito-integrado-max232cpe-max232-max232n-dip16/up/MLBU3335206018?pdp_filters=item_id%3AMLB5530394406&amp;matt_tool=38524122#origin=share&amp;sid=share&amp;wid=MLB5530394406&amp;action=copy</text:a>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splay</text:p>
          </table:table-cell>
          <table:table-cell table:number-columns-repeated="2" office:value-type="string" calcext:value-type="string">
            <text:p>LCD-016N002L</text:p>
          </table:table-cell>
          <table:table-cell office:value-type="float" office:value="1" calcext:value-type="float">
            <text:p>1</text:p>
          </table:table-cell>
          <table:table-cell office:value-type="float" office:value="170.96" calcext:value-type="float">
            <text:p>170,96</text:p>
          </table:table-cell>
          <table:table-cell office:value-type="float" office:value="1" calcext:value-type="float">
            <text:p>1</text:p>
          </table:table-cell>
          <table:table-cell table:formula="of:=[.E30]/[.F30]*[.D30]" office:value-type="float" office:value="170.96" calcext:value-type="float">
            <text:p>170,96</text:p>
          </table:table-cell>
          <table:table-cell office:value-type="string" calcext:value-type="string">
            <text:p><text:a xlink:href="https://www.proesi.com.br/display-lcd-winstar-wh-1602l-tmi-jt-16x2-big-number-com-back-azul?srsltid=AfmBOopf5ZT1TUvKtpK8hfdvSWwyZ6HeULLoDlMMx5YCmlGqDGc3X-poUik#derivacao=8" xlink:type="simple">https://www.proesi.com.br/display-lcd-winstar-wh-1602l-tmi-jt-16x2-big-number-com-back-azul?srsltid=AfmBOopf5ZT1TUvKtpK8hfdvSWwyZ6HeULLoDlMMx5YCmlGqDGc3X-poUik#derivacao=8</text:a>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rystal</text:p>
          </table:table-cell>
          <table:table-cell office:value-type="string" calcext:value-type="string">
            <text:p>Resonator-2Pin_W10.0mm_H5.0mm</text:p>
          </table:table-cell>
          <table:table-cell office:value-type="string" calcext:value-type="string">
            <text:p>16Mhz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,00</text:p>
          </table:table-cell>
          <table:table-cell office:value-type="float" office:value="50" calcext:value-type="float">
            <text:p>50</text:p>
          </table:table-cell>
          <table:table-cell table:formula="of:=[.E31]/[.F31]*[.D31]" office:value-type="float" office:value="0.74" calcext:value-type="float">
            <text:p>0,74</text:p>
          </table:table-cell>
          <table:table-cell office:value-type="string" calcext:value-type="string">
            <text:p><text:a xlink:href="https://www.mercadolivre.com.br/50x-cristal-hc49s-16-mhz/up/MLBU731193518?pdp_filters=item_id%3AMLB1364778380&amp;matt_tool=38524122#origin=share&amp;sid=share&amp;wid=MLB1364778380&amp;action=copy" xlink:type="simple">https://www.mercadolivre.com.br/50x-cristal-hc49s-16-mhz/up/MLBU731193518?pdp_filters=item_id%3AMLB1364778380&amp;matt_tool=38524122#origin=share&amp;sid=share&amp;wid=MLB1364778380&amp;action=copy</text:a>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3" number:min-decimal-places="13" number:min-integer-digits="1"/>
    </number:number-style>
    <number:number-style style:name="N115">
      <number:number number:decimal-places="12" number:min-decimal-places="12" number:min-integer-digits="1"/>
    </number:number-style>
    <number:number-style style:name="N116">
      <number:number number:decimal-places="11" number:min-decimal-places="11" number:min-integer-digits="1"/>
    </number:number-style>
    <number:number-style style:name="N117">
      <number:number number:decimal-places="10" number:min-decimal-places="10" number:min-integer-digits="1"/>
    </number:number-style>
    <number:number-style style:name="N118">
      <number:number number:decimal-places="9" number:min-decimal-places="9" number:min-integer-digits="1"/>
    </number:number-style>
    <number:number-style style:name="N119">
      <number:number number:decimal-places="8" number:min-decimal-places="8" number:min-integer-digits="1"/>
    </number:number-style>
    <number:number-style style:name="N120">
      <number:number number:decimal-places="7" number:min-decimal-places="7" number:min-integer-digits="1"/>
    </number:number-style>
    <number:number-style style:name="N121">
      <number:number number:decimal-places="6" number:min-decimal-places="6" number:min-integer-digits="1"/>
    </number:number-style>
    <number:number-style style:name="N122">
      <number:number number:decimal-places="5" number:min-decimal-places="5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">
      <number:number number:decimal-places="3" number:min-decimal-places="3" number:min-integer-digits="1"/>
    </number:number-style>
    <number:number-style style:name="N125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1">00/00/0000</text:date>, <text:time style:data-style-name="N2" text:time-value="12:27:05.477266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06T14:08:11.022763800</meta:creation-date>
    <dc:date>2026-06-11T14:45:32.598597400</dc:date>
    <meta:editing-duration>PT1H15M4S</meta:editing-duration>
    <meta:editing-cycles>5</meta:editing-cycles>
    <meta:generator>LibreOffice/25.8.6.2$Windows_X86_64 LibreOffice_project/b4b39682cd9868fa725bc664aff94278d315bd04</meta:generator>
    <meta:document-statistic meta:table-count="1" meta:cell-count="253" meta:object-count="0"/>
  </office:meta>
</office:document-meta>
</file>